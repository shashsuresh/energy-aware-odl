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Cantarell" style:font-name-complex="Noto Sans Arabi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lta acc</text:p>
          </table:table-cell>
          <table:table-cell office:value-type="string" calcext:value-type="string">
            <text:p>Delta latency</text:p>
          </table:table-cell>
          <table:table-cell office:value-type="string" calcext:value-type="string">
            <text:p>Delta MACs</text:p>
          </table:table-cell>
          <table:table-cell office:value-type="string" calcext:value-type="string">
            <text:p>Average current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Delta en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_all</text:p>
          </table:table-cell>
          <table:table-cell table:style-name="ce1" table:formula="of:=86.66-[.I19]" office:value-type="float" office:value="1.3" calcext:value-type="float">
            <text:p>1.3</text:p>
          </table:table-cell>
          <table:table-cell table:number-columns-repeated="5"/>
          <table:table-cell table:style-name="ce2" office:value-type="string" calcext:value-type="string">
            <text:p>20 Bias</text:p>
          </table:table-cell>
          <table:table-cell office:value-type="float" office:value="85.15" calcext:value-type="float">
            <text:p>85.15</text:p>
          </table:table-cell>
        </table:table-row>
        <table:table-row table:style-name="ro1">
          <table:table-cell office:value-type="string" calcext:value-type="string">
            <text:p>21_half</text:p>
          </table:table-cell>
          <table:table-cell table:formula="of:=86.23-[.I19]" office:value-type="float" office:value="0.870000000000005" calcext:value-type="float">
            <text:p>0.870000000000005</text:p>
          </table:table-cell>
          <table:table-cell table:number-columns-repeated="6"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22_all</text:p>
          </table:table-cell>
          <table:table-cell table:formula="of:=85.09-[.I2]" office:value-type="float" office:value="-0.0600000000000023" calcext:value-type="float">
            <text:p>-0.0600000000000023</text:p>
          </table:table-cell>
          <table:table-cell office:value-type="string" calcext:value-type="string">
            <text:p>NA</text:p>
          </table:table-cell>
          <table:table-cell table:formula="of:=32174102-[.I7]" office:value-type="float" office:value="256000" calcext:value-type="float">
            <text:p>256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_half</text:p>
          </table:table-cell>
          <table:table-cell table:formula="of:=85.25-[.I2]" office:value-type="float" office:value="0.0999999999999943" calcext:value-type="float">
            <text:p>0.0999999999999943</text:p>
          </table:table-cell>
          <table:table-cell office:value-type="string" calcext:value-type="string">
            <text:p>NA</text:p>
          </table:table-cell>
          <table:table-cell table:formula="of:=32046102-[.I7]" office:value-type="float" office:value="128000" calcext:value-type="float">
            <text:p>128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_quarter</text:p>
          </table:table-cell>
          <table:table-cell table:formula="of:=84.92-[.I2]" office:value-type="float" office:value="-0.230000000000004" calcext:value-type="float">
            <text:p>-0.2300000000000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_all</text:p>
          </table:table-cell>
          <table:table-cell table:formula="of:=86.31-[.I2]" office:value-type="float" office:value="1.16" calcext:value-type="float">
            <text:p>1.16</text:p>
          </table:table-cell>
          <table:table-cell table:formula="of:=517-[.I3]" office:value-type="float" office:value="20" calcext:value-type="float">
            <text:p>20</text:p>
          </table:table-cell>
          <table:table-cell table:formula="of:=32409622-[.I7]" office:value-type="float" office:value="491520" calcext:value-type="float">
            <text:p>491520</text:p>
          </table:table-cell>
          <table:table-cell office:value-type="float" office:value="393.93" calcext:value-type="float">
            <text:p>393.93</text:p>
          </table:table-cell>
          <table:table-cell table:formula="of:=5*[.E7]*([.$I$3]+[.C7])/(1000*1000)" office:value-type="float" office:value="1.01830905" calcext:value-type="float">
            <text:p>1.01830905</text:p>
          </table:table-cell>
          <table:table-cell table:formula="of:=[.F7]-[.I10]" office:value-type="float" office:value="0.0445121000000001" calcext:value-type="float">
            <text:p>0.0445121000000001</text:p>
          </table:table-cell>
          <table:table-cell/>
          <table:table-cell office:value-type="float" office:value="31918102" calcext:value-type="float">
            <text:p>31918102</text:p>
          </table:table-cell>
        </table:table-row>
        <table:table-row table:style-name="ro1">
          <table:table-cell office:value-type="string" calcext:value-type="string">
            <text:p>23_half</text:p>
          </table:table-cell>
          <table:table-cell table:formula="of:=86.34-[.I2]" office:value-type="float" office:value="1.19" calcext:value-type="float">
            <text:p>1.19</text:p>
          </table:table-cell>
          <table:table-cell table:formula="of:=508-[.I3]" office:value-type="float" office:value="11" calcext:value-type="float">
            <text:p>11</text:p>
          </table:table-cell>
          <table:table-cell table:formula="of:=32163862-[.I7]" office:value-type="float" office:value="245760" calcext:value-type="float">
            <text:p>245760</text:p>
          </table:table-cell>
          <table:table-cell office:value-type="float" office:value="394.17" calcext:value-type="float">
            <text:p>394.17</text:p>
          </table:table-cell>
          <table:table-cell table:formula="of:=5*[.E8]*([.$I$3]+[.C8])/(1000*1000)" office:value-type="float" office:value="1.0011918" calcext:value-type="float">
            <text:p>1.0011918</text:p>
          </table:table-cell>
          <table:table-cell table:formula="of:=[.F8]-[.I10]" office:value-type="float" office:value="0.02739485" calcext:value-type="float">
            <text:p>0.02739485</text:p>
          </table:table-cell>
          <table:table-cell/>
          <table:table-cell office:value-type="float" office:value="391.87" calcext:value-type="float">
            <text:p>391.87</text:p>
          </table:table-cell>
        </table:table-row>
        <table:table-row table:style-name="ro1">
          <table:table-cell office:value-type="string" calcext:value-type="string">
            <text:p>23_quarter</text:p>
          </table:table-cell>
          <table:table-cell table:formula="of:=85.93-[.I2]" office:value-type="float" office:value="0.780000000000001" calcext:value-type="float">
            <text:p>0.780000000000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_all</text:p>
          </table:table-cell>
          <table:table-cell table:formula="of:=86.23-[.I19]" office:value-type="float" office:value="0.870000000000005" calcext:value-type="float">
            <text:p>0.870000000000005</text:p>
          </table:table-cell>
          <table:table-cell table:formula="of:=518-[.I3]" office:value-type="float" office:value="21" calcext:value-type="float">
            <text:p>21</text:p>
          </table:table-cell>
          <table:table-cell table:formula="of:=32360470-[.I7]" office:value-type="float" office:value="442368" calcext:value-type="float">
            <text:p>442368</text:p>
          </table:table-cell>
          <table:table-cell office:value-type="float" office:value="394.23" calcext:value-type="float">
            <text:p>394.23</text:p>
          </table:table-cell>
          <table:table-cell table:formula="of:=5*[.E10]*([.$I$3]+[.C10])/(1000*1000)" office:value-type="float" office:value="1.0210557" calcext:value-type="float">
            <text:p>1.0210557</text:p>
          </table:table-cell>
          <table:table-cell table:formula="of:=[.F10]-[.I10]" office:value-type="float" office:value="0.04725875" calcext:value-type="float">
            <text:p>0.04725875</text:p>
          </table:table-cell>
          <table:table-cell/>
          <table:table-cell table:formula="of:=5*[.I8]*[.I3]/(1000*1000)" office:value-type="float" office:value="0.97379695" calcext:value-type="float">
            <text:p>0.97379695</text:p>
          </table:table-cell>
        </table:table-row>
        <table:table-row table:style-name="ro1">
          <table:table-cell office:value-type="string" calcext:value-type="string">
            <text:p>24_half</text:p>
          </table:table-cell>
          <table:table-cell table:formula="of:=85.95-[.I19]" office:value-type="float" office:value="0.590000000000003" calcext:value-type="float">
            <text:p>0.590000000000003</text:p>
          </table:table-cell>
          <table:table-cell table:formula="of:=505-[.I3]" office:value-type="float" office:value="8" calcext:value-type="float">
            <text:p>8</text:p>
          </table:table-cell>
          <table:table-cell table:formula="of:=32139286-[.I7]" office:value-type="float" office:value="221184" calcext:value-type="float">
            <text:p>221184</text:p>
          </table:table-cell>
          <table:table-cell office:value-type="float" office:value="394.52" calcext:value-type="float">
            <text:p>394.52</text:p>
          </table:table-cell>
          <table:table-cell table:formula="of:=5*[.E11]*([.$I$3]+[.C11])/(1000*1000)" office:value-type="float" office:value="0.996163" calcext:value-type="float">
            <text:p>0.996163</text:p>
          </table:table-cell>
          <table:table-cell table:formula="of:=[.F11]-[.I10]" office:value-type="float" office:value="0.02236605" calcext:value-type="float">
            <text:p>0.02236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_quarter</text:p>
          </table:table-cell>
          <table:table-cell table:formula="of:=85.15-[.I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_all</text:p>
          </table:table-cell>
          <table:table-cell/>
          <table:table-cell office:value-type="string" calcext:value-type="string">
            <text:p>NA</text:p>
          </table:table-cell>
          <table:table-cell table:formula="of:=32001046-[.I7]" office:value-type="float" office:value="82944" calcext:value-type="float">
            <text:p>82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5_half</text:p>
          </table:table-cell>
          <table:table-cell table:formula="of:=85.15-[.I2]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formula="of:=31959574-[.I7]" office:value-type="float" office:value="41472" calcext:value-type="float">
            <text:p>414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5_quarter</text:p>
          </table:table-cell>
          <table:table-cell table:formula="of:=84.96-[.I2]" office:value-type="float" office:value="-0.190000000000012" calcext:value-type="float">
            <text:p>-0.1900000000000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_all</text:p>
          </table:table-cell>
          <table:table-cell table:formula="of:=85.82-[.I2]" office:value-type="float" office:value="0.669999999999988" calcext:value-type="float">
            <text:p>0.669999999999988</text:p>
          </table:table-cell>
          <table:table-cell table:formula="of:=516-[.I3]" office:value-type="float" office:value="19" calcext:value-type="float">
            <text:p>19</text:p>
          </table:table-cell>
          <table:table-cell table:formula="of:=32360470-[.I7]" office:value-type="float" office:value="442368" calcext:value-type="float">
            <text:p>442368</text:p>
          </table:table-cell>
          <table:table-cell office:value-type="float" office:value="394.45" calcext:value-type="float">
            <text:p>394.45</text:p>
          </table:table-cell>
          <table:table-cell table:formula="of:=5*[.E16]*([.$I$3]+[.C16])/(1000*1000)" office:value-type="float" office:value="1.017681" calcext:value-type="float">
            <text:p>1.017681</text:p>
          </table:table-cell>
          <table:table-cell table:formula="of:=[.F16]-[.I10]" office:value-type="float" office:value="0.0438840500000001" calcext:value-type="float">
            <text:p>0.043884050000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_half</text:p>
          </table:table-cell>
          <table:table-cell table:formula="of:=85.48-[.I2]" office:value-type="float" office:value="0.329999999999998" calcext:value-type="float">
            <text:p>0.329999999999998</text:p>
          </table:table-cell>
          <table:table-cell table:formula="of:=510-[.I3]" office:value-type="float" office:value="13" calcext:value-type="float">
            <text:p>13</text:p>
          </table:table-cell>
          <table:table-cell table:formula="of:=32139286-[.I7]" office:value-type="float" office:value="221184" calcext:value-type="float">
            <text:p>221184</text:p>
          </table:table-cell>
          <table:table-cell office:value-type="float" office:value="394.54" calcext:value-type="float">
            <text:p>394.54</text:p>
          </table:table-cell>
          <table:table-cell table:formula="of:=5*[.E17]*([.$I$3]+[.C17])/(1000*1000)" office:value-type="float" office:value="1.006077" calcext:value-type="float">
            <text:p>1.006077</text:p>
          </table:table-cell>
          <table:table-cell table:formula="of:=[.F17]-[.I10]" office:value-type="float" office:value="0.0322800500000001" calcext:value-type="float">
            <text:p>0.032280050000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_quarter</text:p>
          </table:table-cell>
          <table:table-cell table:formula="of:=85.28-[.I2]" office:value-type="float" office:value="0.129999999999995" calcext:value-type="float">
            <text:p>0.1299999999999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_all</text:p>
          </table:table-cell>
          <table:table-cell table:formula="of:=86.52-[.I2]" office:value-type="float" office:value="1.36999999999999" calcext:value-type="float">
            <text:p>1.36999999999999</text:p>
          </table:table-cell>
          <table:table-cell table:formula="of:=525-[.I3]" office:value-type="float" office:value="28" calcext:value-type="float">
            <text:p>28</text:p>
          </table:table-cell>
          <table:table-cell table:formula="of:=32507926-[.I7]" office:value-type="float" office:value="589824" calcext:value-type="float">
            <text:p>589824</text:p>
          </table:table-cell>
          <table:table-cell office:value-type="float" office:value="394.57" calcext:value-type="float">
            <text:p>394.57</text:p>
          </table:table-cell>
          <table:table-cell table:formula="of:=5*[.E19]*([.$I$3]+[.C19])/(1000*1000)" office:value-type="float" office:value="1.03574625" calcext:value-type="float">
            <text:p>1.03574625</text:p>
          </table:table-cell>
          <table:table-cell table:formula="of:=[.F19]-[.I10]" office:value-type="float" office:value="0.0619493000000001" calcext:value-type="float">
            <text:p>0.0619493000000001</text:p>
          </table:table-cell>
          <table:table-cell office:value-type="string" calcext:value-type="string">
            <text:p>25 bias</text:p>
          </table:table-cell>
          <table:table-cell office:value-type="float" office:value="85.36" calcext:value-type="float">
            <text:p>85.36</text:p>
          </table:table-cell>
        </table:table-row>
        <table:table-row table:style-name="ro1">
          <table:table-cell office:value-type="string" calcext:value-type="string">
            <text:p>27_half</text:p>
          </table:table-cell>
          <table:table-cell table:formula="of:=85.97-[.I2]" office:value-type="float" office:value="0.819999999999993" calcext:value-type="float">
            <text:p>0.819999999999993</text:p>
          </table:table-cell>
          <table:table-cell table:formula="of:=507-[.I3]" office:value-type="float" office:value="10" calcext:value-type="float">
            <text:p>10</text:p>
          </table:table-cell>
          <table:table-cell table:formula="of:=32213014-[.I7]" office:value-type="float" office:value="294912" calcext:value-type="float">
            <text:p>294912</text:p>
          </table:table-cell>
          <table:table-cell office:value-type="float" office:value="394.17" calcext:value-type="float">
            <text:p>394.17</text:p>
          </table:table-cell>
          <table:table-cell table:formula="of:=5*[.E20]*([.$I$3]+[.C20])/(1000*1000)" office:value-type="float" office:value="0.99922095" calcext:value-type="float">
            <text:p>0.99922095</text:p>
          </table:table-cell>
          <table:table-cell table:formula="of:=[.F20]-[.I10]" office:value-type="float" office:value="0.0254240000000001" calcext:value-type="float">
            <text:p>0.025424000000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_quarter</text:p>
          </table:table-cell>
          <table:table-cell table:formula="of:=85.53-[.I2]" office:value-type="float" office:value="0.379999999999995" calcext:value-type="float">
            <text:p>0.3799999999999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8_all</text:p>
          </table:table-cell>
          <table:table-cell table:formula="of:=85.17-[.I2]" office:value-type="float" office:value="0.019999999999996" calcext:value-type="float">
            <text:p>0.019999999999996</text:p>
          </table:table-cell>
          <table:table-cell office:value-type="string" calcext:value-type="string">
            <text:p>NA</text:p>
          </table:table-cell>
          <table:table-cell table:formula="of:=32028694-[.I7]" office:value-type="float" office:value="110592" calcext:value-type="float">
            <text:p>1105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8_half</text:p>
          </table:table-cell>
          <table:table-cell table:formula="of:=85.35-[.I2]" office:value-type="float" office:value="0.199999999999989" calcext:value-type="float">
            <text:p>0.199999999999989</text:p>
          </table:table-cell>
          <table:table-cell office:value-type="string" calcext:value-type="string">
            <text:p>NA</text:p>
          </table:table-cell>
          <table:table-cell table:formula="of:=31973398-[.I7]" office:value-type="float" office:value="55296" calcext:value-type="float">
            <text:p>552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8_quarter</text:p>
          </table:table-cell>
          <table:table-cell table:formula="of:=84.89-[.I2]" office:value-type="float" office:value="-0.260000000000005" calcext:value-type="float">
            <text:p>-0.260000000000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_all</text:p>
          </table:table-cell>
          <table:table-cell table:formula="of:=85.8-[.I2]" office:value-type="float" office:value="0.649999999999992" calcext:value-type="float">
            <text:p>0.649999999999992</text:p>
          </table:table-cell>
          <table:table-cell table:formula="of:=520-[.I3]" office:value-type="float" office:value="23" calcext:value-type="float">
            <text:p>23</text:p>
          </table:table-cell>
          <table:table-cell table:formula="of:=32507926-[.I7]" office:value-type="float" office:value="589824" calcext:value-type="float">
            <text:p>589824</text:p>
          </table:table-cell>
          <table:table-cell office:value-type="float" office:value="394.18" calcext:value-type="float">
            <text:p>394.18</text:p>
          </table:table-cell>
          <table:table-cell table:formula="of:=5*[.E25]*([.$I$3]+[.C25])/(1000*1000)" office:value-type="float" office:value="1.024868" calcext:value-type="float">
            <text:p>1.024868</text:p>
          </table:table-cell>
          <table:table-cell table:formula="of:=[.F25]-[.I10]" office:value-type="float" office:value="0.0510710499999999" calcext:value-type="float">
            <text:p>0.051071049999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_half</text:p>
          </table:table-cell>
          <table:table-cell table:formula="of:=85.69-[.I2]" office:value-type="float" office:value="0.539999999999992" calcext:value-type="float">
            <text:p>0.539999999999992</text:p>
          </table:table-cell>
          <table:table-cell table:formula="of:=512-[.I3]" office:value-type="float" office:value="15" calcext:value-type="float">
            <text:p>15</text:p>
          </table:table-cell>
          <table:table-cell table:formula="of:=32213014-[.I7]" office:value-type="float" office:value="294912" calcext:value-type="float">
            <text:p>294912</text:p>
          </table:table-cell>
          <table:table-cell office:value-type="float" office:value="394.23" calcext:value-type="float">
            <text:p>394.23</text:p>
          </table:table-cell>
          <table:table-cell table:formula="of:=5*[.E26]*([.$I$3]+[.C26])/(1000*1000)" office:value-type="float" office:value="1.0092288" calcext:value-type="float">
            <text:p>1.0092288</text:p>
          </table:table-cell>
          <table:table-cell table:formula="of:=[.F26]-[.I10]" office:value-type="float" office:value="0.03543185" calcext:value-type="float">
            <text:p>0.03543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_quarter</text:p>
          </table:table-cell>
          <table:table-cell table:formula="of:=85.23-[.I2]" office:value-type="float" office:value="0.0799999999999983" calcext:value-type="float">
            <text:p>0.07999999999999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_all</text:p>
          </table:table-cell>
          <table:table-cell table:formula="of:=86.7-[.I2]" office:value-type="float" office:value="1.55" calcext:value-type="float">
            <text:p>1.55</text:p>
          </table:table-cell>
          <table:table-cell table:formula="of:=528-[.I3]" office:value-type="float" office:value="31" calcext:value-type="float">
            <text:p>31</text:p>
          </table:table-cell>
          <table:table-cell table:formula="of:=32655382-[.I7]" office:value-type="float" office:value="737280" calcext:value-type="float">
            <text:p>737280</text:p>
          </table:table-cell>
          <table:table-cell office:value-type="float" office:value="394.23" calcext:value-type="float">
            <text:p>394.23</text:p>
          </table:table-cell>
          <table:table-cell table:formula="of:=5*[.E28]*([.$I$3]+[.C28])/(1000*1000)" office:value-type="float" office:value="1.0407672" calcext:value-type="float">
            <text:p>1.0407672</text:p>
          </table:table-cell>
          <table:table-cell table:formula="of:=[.F28]-[.I10]" office:value-type="float" office:value="0.0669702500000001" calcext:value-type="float">
            <text:p>0.066970250000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_half</text:p>
          </table:table-cell>
          <table:table-cell table:formula="of:=86.39-[.I2]" office:value-type="float" office:value="1.23999999999999" calcext:value-type="float">
            <text:p>1.23999999999999</text:p>
          </table:table-cell>
          <table:table-cell table:formula="of:=510-[.I3]" office:value-type="float" office:value="13" calcext:value-type="float">
            <text:p>13</text:p>
          </table:table-cell>
          <table:table-cell table:formula="of:=32286742-[.I7]" office:value-type="float" office:value="368640" calcext:value-type="float">
            <text:p>368640</text:p>
          </table:table-cell>
          <table:table-cell office:value-type="float" office:value="394.38" calcext:value-type="float">
            <text:p>394.38</text:p>
          </table:table-cell>
          <table:table-cell table:formula="of:=5*[.E29]*([.$I$3]+[.C29])/(1000*1000)" office:value-type="float" office:value="1.005669" calcext:value-type="float">
            <text:p>1.005669</text:p>
          </table:table-cell>
          <table:table-cell table:formula="of:=[.F29]-[.I10]" office:value-type="float" office:value="0.0318720499999999" calcext:value-type="float">
            <text:p>0.031872049999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_quarter</text:p>
          </table:table-cell>
          <table:table-cell table:formula="of:=85.62-[.I2]" office:value-type="float" office:value="0.469999999999999" calcext:value-type="float">
            <text:p>0.4699999999999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1_all</text:p>
          </table:table-cell>
          <table:table-cell table:formula="of:=85.35-[.I2]" office:value-type="float" office:value="0.199999999999989" calcext:value-type="float">
            <text:p>0.199999999999989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_half</text:p>
          </table:table-cell>
          <table:table-cell table:formula="of:=85.38-[.I2]" office:value-type="float" office:value="0.22999999999999" calcext:value-type="float">
            <text:p>0.22999999999999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_quarter</text:p>
          </table:table-cell>
          <table:table-cell table:formula="of:=84.99-[.I2]" office:value-type="float" office:value="-0.160000000000011" calcext:value-type="float">
            <text:p>-0.160000000000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_all</text:p>
          </table:table-cell>
          <table:table-cell table:formula="of:=86.27-[.I2]" office:value-type="float" office:value="1.11999999999999" calcext:value-type="float">
            <text:p>1.11999999999999</text:p>
          </table:table-cell>
          <table:table-cell table:formula="of:=524-[.I3]" office:value-type="float" office:value="27" calcext:value-type="float">
            <text:p>27</text:p>
          </table:table-cell>
          <table:table-cell table:formula="of:=32286742-[.I7]" office:value-type="float" office:value="368640" calcext:value-type="float">
            <text:p>368640</text:p>
          </table:table-cell>
          <table:table-cell office:value-type="float" office:value="393.97" calcext:value-type="float">
            <text:p>393.97</text:p>
          </table:table-cell>
          <table:table-cell table:formula="of:=5*[.E34]*([.$I$3]+[.C34])/(1000*1000)" office:value-type="float" office:value="1.0322014" calcext:value-type="float">
            <text:p>1.0322014</text:p>
          </table:table-cell>
          <table:table-cell table:formula="of:=[.F34]-[.I10]" office:value-type="float" office:value="0.0584044499999999" calcext:value-type="float">
            <text:p>0.058404449999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_half</text:p>
          </table:table-cell>
          <table:table-cell table:formula="of:=86.65-[.I2]" office:value-type="float" office:value="1.5" calcext:value-type="float">
            <text:p>1.5</text:p>
          </table:table-cell>
          <table:table-cell table:formula="of:=510-[.I3]" office:value-type="float" office:value="13" calcext:value-type="float">
            <text:p>13</text:p>
          </table:table-cell>
          <table:table-cell table:formula="of:=32102422-[.I7]" office:value-type="float" office:value="184320" calcext:value-type="float">
            <text:p>184320</text:p>
          </table:table-cell>
          <table:table-cell office:value-type="float" office:value="394.4" calcext:value-type="float">
            <text:p>394.4</text:p>
          </table:table-cell>
          <table:table-cell table:formula="of:=5*[.E35]*([.$I$3]+[.C35])/(1000*1000)" office:value-type="float" office:value="1.00572" calcext:value-type="float">
            <text:p>1.00572</text:p>
          </table:table-cell>
          <table:table-cell table:formula="of:=[.F35]-[.I10]" office:value-type="float" office:value="0.03192305" calcext:value-type="float">
            <text:p>0.03192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_quarter</text:p>
          </table:table-cell>
          <table:table-cell table:formula="of:=85.67-[.I2]" office:value-type="float" office:value="0.519999999999996" calcext:value-type="float">
            <text:p>0.5199999999999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_all</text:p>
          </table:table-cell>
          <table:table-cell table:formula="of:=85.59-[.I2]" office:value-type="float" office:value="0.439999999999998" calcext:value-type="float">
            <text:p>0.439999999999998</text:p>
          </table:table-cell>
          <table:table-cell table:formula="of:=535-[.I3]" office:value-type="float" office:value="38" calcext:value-type="float">
            <text:p>38</text:p>
          </table:table-cell>
          <table:table-cell table:formula="of:=32507926-[.I7]" office:value-type="float" office:value="589824" calcext:value-type="float">
            <text:p>589824</text:p>
          </table:table-cell>
          <table:table-cell office:value-type="float" office:value="393.03" calcext:value-type="float">
            <text:p>393.03</text:p>
          </table:table-cell>
          <table:table-cell table:formula="of:=5*[.E37]*([.$I$3]+[.C37])/(1000*1000)" office:value-type="float" office:value="1.05135525" calcext:value-type="float">
            <text:p>1.05135525</text:p>
          </table:table-cell>
          <table:table-cell table:formula="of:=[.F37]-[.I10]" office:value-type="float" office:value="0.0775583000000001" calcext:value-type="float">
            <text:p>0.077558300000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_half</text:p>
          </table:table-cell>
          <table:table-cell table:formula="of:=85.67-[.I2]" office:value-type="float" office:value="0.519999999999996" calcext:value-type="float">
            <text:p>0.519999999999996</text:p>
          </table:table-cell>
          <table:table-cell table:formula="of:=520-[.I3]" office:value-type="float" office:value="23" calcext:value-type="float">
            <text:p>23</text:p>
          </table:table-cell>
          <table:table-cell table:formula="of:=32213014-[.I7]" office:value-type="float" office:value="294912" calcext:value-type="float">
            <text:p>294912</text:p>
          </table:table-cell>
          <table:table-cell office:value-type="float" office:value="393.48" calcext:value-type="float">
            <text:p>393.48</text:p>
          </table:table-cell>
          <table:table-cell table:formula="of:=5*[.E38]*([.$I$3]+[.C38])/(1000*1000)" office:value-type="float" office:value="1.023048" calcext:value-type="float">
            <text:p>1.023048</text:p>
          </table:table-cell>
          <table:table-cell table:formula="of:=[.F38]-[.I10]" office:value-type="float" office:value="0.04925105" calcext:value-type="float">
            <text:p>0.04925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_quarter</text:p>
          </table:table-cell>
          <table:table-cell table:formula="of:=85.61-[.I2]" office:value-type="float" office:value="0.459999999999994" calcext:value-type="float">
            <text:p>0.4599999999999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4_all</text:p>
          </table:table-cell>
          <table:table-cell table:formula="of:=85.15-[.I2]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formula="of:=32071702-[.I7]" office:value-type="float" office:value="153600" calcext:value-type="float">
            <text:p>153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4_half</text:p>
          </table:table-cell>
          <table:table-cell table:formula="of:=85.25-[.I2]" office:value-type="float" office:value="0.0999999999999943" calcext:value-type="float">
            <text:p>0.0999999999999943</text:p>
          </table:table-cell>
          <table:table-cell office:value-type="string" calcext:value-type="string">
            <text:p>NA</text:p>
          </table:table-cell>
          <table:table-cell table:formula="of:=31994902-[.I7]" office:value-type="float" office:value="76800" calcext:value-type="float">
            <text:p>76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4_quarter</text:p>
          </table:table-cell>
          <table:table-cell table:formula="of:=84.99-[.I2]" office:value-type="float" office:value="-0.160000000000011" calcext:value-type="float">
            <text:p>-0.160000000000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5_full</text:p>
          </table:table-cell>
          <table:table-cell table:formula="of:=86.27-[.I2]" office:value-type="float" office:value="1.11999999999999" calcext:value-type="float">
            <text:p>1.11999999999999</text:p>
          </table:table-cell>
          <table:table-cell table:formula="of:=537-[.I3]" office:value-type="float" office:value="40" calcext:value-type="float">
            <text:p>40</text:p>
          </table:table-cell>
          <table:table-cell table:formula="of:=32507926-[.I7]" office:value-type="float" office:value="589824" calcext:value-type="float">
            <text:p>589824</text:p>
          </table:table-cell>
          <table:table-cell office:value-type="float" office:value="393.93" calcext:value-type="float">
            <text:p>393.93</text:p>
          </table:table-cell>
          <table:table-cell table:formula="of:=5*[.E43]*([.$I$3]+[.C43])/(1000*1000)" office:value-type="float" office:value="1.05770205" calcext:value-type="float">
            <text:p>1.05770205</text:p>
          </table:table-cell>
          <table:table-cell table:formula="of:=[.F43]-[.I10]" office:value-type="float" office:value="0.0839051000000001" calcext:value-type="float">
            <text:p>0.083905100000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_half</text:p>
          </table:table-cell>
          <table:table-cell table:formula="of:=85.66-[.I2]" office:value-type="float" office:value="0.509999999999991" calcext:value-type="float">
            <text:p>0.509999999999991</text:p>
          </table:table-cell>
          <table:table-cell table:formula="of:=517-[.I3]" office:value-type="float" office:value="20" calcext:value-type="float">
            <text:p>20</text:p>
          </table:table-cell>
          <table:table-cell table:formula="of:=32213014-[.I7]" office:value-type="float" office:value="294912" calcext:value-type="float">
            <text:p>294912</text:p>
          </table:table-cell>
          <table:table-cell office:value-type="float" office:value="394.14" calcext:value-type="float">
            <text:p>394.14</text:p>
          </table:table-cell>
          <table:table-cell table:formula="of:=5*[.E44]*([.$I$3]+[.C44])/(1000*1000)" office:value-type="float" office:value="1.0188519" calcext:value-type="float">
            <text:p>1.0188519</text:p>
          </table:table-cell>
          <table:table-cell table:formula="of:=[.F44]-[.I10]" office:value-type="float" office:value="0.0450549499999998" calcext:value-type="float">
            <text:p>0.045054949999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_quarter</text:p>
          </table:table-cell>
          <table:table-cell table:formula="of:=85.25-[.I2]" office:value-type="float" office:value="0.0999999999999943" calcext:value-type="float">
            <text:p>0.09999999999999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6_full</text:p>
          </table:table-cell>
          <table:table-cell table:formula="of:=86.05-[.I2]" office:value-type="float" office:value="0.899999999999992" calcext:value-type="float">
            <text:p>0.899999999999992</text:p>
          </table:table-cell>
          <table:table-cell table:formula="of:=535-[.I3]" office:value-type="float" office:value="38" calcext:value-type="float">
            <text:p>38</text:p>
          </table:table-cell>
          <table:table-cell table:formula="of:=32507926-[.I7]" office:value-type="float" office:value="589824" calcext:value-type="float">
            <text:p>589824</text:p>
          </table:table-cell>
          <table:table-cell office:value-type="float" office:value="394.17" calcext:value-type="float">
            <text:p>394.17</text:p>
          </table:table-cell>
          <table:table-cell table:formula="of:=5*[.E46]*([.$I$3]+[.C46])/(1000*1000)" office:value-type="float" office:value="1.05440475" calcext:value-type="float">
            <text:p>1.05440475</text:p>
          </table:table-cell>
          <table:table-cell table:formula="of:=[.F46]-[.I10]" office:value-type="float" office:value="0.0806078" calcext:value-type="float">
            <text:p>0.0806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_half</text:p>
          </table:table-cell>
          <table:table-cell table:formula="of:=85.7-[.I2]" office:value-type="float" office:value="0.549999999999997" calcext:value-type="float">
            <text:p>0.549999999999997</text:p>
          </table:table-cell>
          <table:table-cell table:formula="of:=517-[.I3]" office:value-type="float" office:value="20" calcext:value-type="float">
            <text:p>20</text:p>
          </table:table-cell>
          <table:table-cell table:formula="of:=32213014-[.I7]" office:value-type="float" office:value="294912" calcext:value-type="float">
            <text:p>294912</text:p>
          </table:table-cell>
          <table:table-cell office:value-type="float" office:value="394.01" calcext:value-type="float">
            <text:p>394.01</text:p>
          </table:table-cell>
          <table:table-cell table:formula="of:=5*[.E47]*([.$I$3]+[.C47])/(1000*1000)" office:value-type="float" office:value="1.01851585" calcext:value-type="float">
            <text:p>1.01851585</text:p>
          </table:table-cell>
          <table:table-cell table:formula="of:=[.F47]-[.I10]" office:value-type="float" office:value="0.0447189" calcext:value-type="float">
            <text:p>0.0447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_quarter</text:p>
          </table:table-cell>
          <table:table-cell table:formula="of:=85.48-[.I2]" office:value-type="float" office:value="0.329999999999998" calcext:value-type="float">
            <text:p>0.3299999999999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_all</text:p>
          </table:table-cell>
          <table:table-cell table:formula="of:=85.23-[.I2]" office:value-type="float" office:value="0.0799999999999983" calcext:value-type="float">
            <text:p>0.0799999999999983</text:p>
          </table:table-cell>
          <table:table-cell office:value-type="string" calcext:value-type="string">
            <text:p>NA</text:p>
          </table:table-cell>
          <table:table-cell table:formula="of:=32071702-[.I7]" office:value-type="float" office:value="153600" calcext:value-type="float">
            <text:p>153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7_half</text:p>
          </table:table-cell>
          <table:table-cell table:formula="of:=85.2-[.I2]" office:value-type="float" office:value="0.0499999999999972" calcext:value-type="float">
            <text:p>0.0499999999999972</text:p>
          </table:table-cell>
          <table:table-cell office:value-type="string" calcext:value-type="string">
            <text:p>NA</text:p>
          </table:table-cell>
          <table:table-cell table:formula="of:=31994902-[.I7]" office:value-type="float" office:value="76800" calcext:value-type="float">
            <text:p>76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7_quarter</text:p>
          </table:table-cell>
          <table:table-cell table:formula="of:=85.02-[.I2]" office:value-type="float" office:value="-0.13000000000001" calcext:value-type="float">
            <text:p>-0.13000000000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8_all</text:p>
          </table:table-cell>
          <table:table-cell table:formula="of:=84.96-[.I2]" office:value-type="float" office:value="-0.190000000000012" calcext:value-type="float">
            <text:p>-0.190000000000012</text:p>
          </table:table-cell>
          <table:table-cell table:formula="of:=535-[.I3]" office:value-type="float" office:value="38" calcext:value-type="float">
            <text:p>38</text:p>
          </table:table-cell>
          <table:table-cell table:formula="of:=32507926-[.I7]" office:value-type="float" office:value="589824" calcext:value-type="float">
            <text:p>589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8_half</text:p>
          </table:table-cell>
          <table:table-cell table:formula="of:=84.97-[.I2]" office:value-type="float" office:value="-0.180000000000007" calcext:value-type="float">
            <text:p>-0.180000000000007</text:p>
          </table:table-cell>
          <table:table-cell table:formula="of:=518-[.I3]" office:value-type="float" office:value="21" calcext:value-type="float">
            <text:p>21</text:p>
          </table:table-cell>
          <table:table-cell table:formula="of:=32213014-[.I7]" office:value-type="float" office:value="294912" calcext:value-type="float">
            <text:p>2949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8_quarter</text:p>
          </table:table-cell>
          <table:table-cell table:formula="of:=85.2-[.I2]" office:value-type="float" office:value="0.0499999999999972" calcext:value-type="float">
            <text:p>0.04999999999999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9_all</text:p>
          </table:table-cell>
          <table:table-cell table:formula="of:=88.27-[.I2]" office:value-type="float" office:value="3.11999999999999" calcext:value-type="float">
            <text:p>3.11999999999999</text:p>
          </table:table-cell>
          <table:table-cell table:formula="of:=549-[.I3]" office:value-type="float" office:value="52" calcext:value-type="float">
            <text:p>52</text:p>
          </table:table-cell>
          <table:table-cell table:formula="of:=32802838-[.I7]" office:value-type="float" office:value="884736" calcext:value-type="float">
            <text:p>884736</text:p>
          </table:table-cell>
          <table:table-cell office:value-type="float" office:value="393.85" calcext:value-type="float">
            <text:p>393.85</text:p>
          </table:table-cell>
          <table:table-cell table:formula="of:=5*[.E55]*([.$I$3]+[.C55])/(1000*1000)" office:value-type="float" office:value="1.08111825" calcext:value-type="float">
            <text:p>1.08111825</text:p>
          </table:table-cell>
          <table:table-cell table:formula="of:=[.F55]-[.I10]" office:value-type="float" office:value="0.1073213" calcext:value-type="float">
            <text:p>0.1073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_half</text:p>
          </table:table-cell>
          <table:table-cell table:formula="of:=86.94-[.I2]" office:value-type="float" office:value="1.78999999999999" calcext:value-type="float">
            <text:p>1.78999999999999</text:p>
          </table:table-cell>
          <table:table-cell table:formula="of:=526-[.I3]" office:value-type="float" office:value="29" calcext:value-type="float">
            <text:p>29</text:p>
          </table:table-cell>
          <table:table-cell table:formula="of:=32360470-[.I7]" office:value-type="float" office:value="442368" calcext:value-type="float">
            <text:p>442368</text:p>
          </table:table-cell>
          <table:table-cell office:value-type="float" office:value="393.61" calcext:value-type="float">
            <text:p>393.61</text:p>
          </table:table-cell>
          <table:table-cell table:formula="of:=5*[.E56]*([.$I$3]+[.C56])/(1000*1000)" office:value-type="float" office:value="1.0351943" calcext:value-type="float">
            <text:p>1.0351943</text:p>
          </table:table-cell>
          <table:table-cell table:formula="of:=[.F56]-[.I10]" office:value-type="float" office:value="0.0613973500000001" calcext:value-type="float">
            <text:p>0.061397350000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_quarter</text:p>
          </table:table-cell>
          <table:table-cell table:formula="of:=85.87-[.I2]" office:value-type="float" office:value="0.719999999999999" calcext:value-type="float">
            <text:p>0.7199999999999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0_all</text:p>
          </table:table-cell>
          <table:table-cell table:formula="of:=85.15-[.I2]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formula="of:=32001046-[.I7]" office:value-type="float" office:value="82944" calcext:value-type="float">
            <text:p>82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0_half</text:p>
          </table:table-cell>
          <table:table-cell table:formula="of:=85.09-[.I2]" office:value-type="float" office:value="-0.0600000000000023" calcext:value-type="float">
            <text:p>-0.0600000000000023</text:p>
          </table:table-cell>
          <table:table-cell office:value-type="string" calcext:value-type="string">
            <text:p>NA</text:p>
          </table:table-cell>
          <table:table-cell table:formula="of:=31959574-[.I7]" office:value-type="float" office:value="41472" calcext:value-type="float">
            <text:p>414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0_quarter</text:p>
          </table:table-cell>
          <table:table-cell table:formula="of:=84.99-[.I2]" office:value-type="float" office:value="-0.160000000000011" calcext:value-type="float">
            <text:p>-0.160000000000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1_full</text:p>
          </table:table-cell>
          <table:table-cell table:formula="of:=85.23-[.I2]" office:value-type="float" office:value="0.0799999999999983" calcext:value-type="float">
            <text:p>0.0799999999999983</text:p>
          </table:table-cell>
          <table:table-cell table:formula="of:=529-[.I3]" office:value-type="float" office:value="32" calcext:value-type="float">
            <text:p>32</text:p>
          </table:table-cell>
          <table:table-cell table:formula="of:=33392662-[.I7]" office:value-type="float" office:value="1474560" calcext:value-type="float">
            <text:p>1474560</text:p>
          </table:table-cell>
          <table:table-cell office:value-type="float" office:value="393.98" calcext:value-type="float">
            <text:p>393.98</text:p>
          </table:table-cell>
          <table:table-cell table:formula="of:=5*[.E61]*([.$I$3]+[.C61])/(1000*1000)" office:value-type="float" office:value="1.0420771" calcext:value-type="float">
            <text:p>1.0420771</text:p>
          </table:table-cell>
          <table:table-cell table:formula="of:=[.F61]-[.I10]" office:value-type="float" office:value="0.0682801500000002" calcext:value-type="float">
            <text:p>0.068280150000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_half</text:p>
          </table:table-cell>
          <table:table-cell table:formula="of:=85.23-[.I2]" office:value-type="float" office:value="0.0799999999999983" calcext:value-type="float">
            <text:p>0.0799999999999983</text:p>
          </table:table-cell>
          <table:table-cell table:formula="of:=538-[.I3]" office:value-type="float" office:value="41" calcext:value-type="float">
            <text:p>41</text:p>
          </table:table-cell>
          <table:table-cell table:formula="of:=32655382-[.I7]" office:value-type="float" office:value="737280" calcext:value-type="float">
            <text:p>737280</text:p>
          </table:table-cell>
          <table:table-cell office:value-type="float" office:value="394.47" calcext:value-type="float">
            <text:p>394.47</text:p>
          </table:table-cell>
          <table:table-cell table:formula="of:=5*[.E62]*([.$I$3]+[.C62])/(1000*1000)" office:value-type="float" office:value="1.0611243" calcext:value-type="float">
            <text:p>1.0611243</text:p>
          </table:table-cell>
          <table:table-cell table:formula="of:=[.F62]-[.I10]" office:value-type="float" office:value="0.0873273500000001" calcext:value-type="float">
            <text:p>0.087327350000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_quarter</text:p>
          </table:table-cell>
          <table:table-cell table:formula="of:=84.89-[.I2]" office:value-type="float" office:value="-0.260000000000005" calcext:value-type="float">
            <text:p>-0.26000000000000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 style:data-style-name="N2" text:time-value="10:50:08.4136516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14:19:37.843850392</meta:creation-date>
    <dc:date>2025-04-16T11:24:26.652653164</dc:date>
    <meta:editing-duration>PT18H40S</meta:editing-duration>
    <meta:editing-cycles>11</meta:editing-cycles>
    <meta:generator>LibreOffice/24.2.7.2$Linux_X86_64 LibreOffice_project/420$Build-2</meta:generator>
    <meta:document-statistic meta:table-count="1" meta:cell-count="290" meta:object-count="0"/>
  </office:meta>
</office:document-meta>
</file>